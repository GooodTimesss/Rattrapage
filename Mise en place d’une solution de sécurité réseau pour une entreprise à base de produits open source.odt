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2" style:parent-style-name="Policepardéfaut" style:family="text">
      <style:text-properties style:font-name="Times New Roman" style:font-name-asian="Times New Roman" fo:font-weight="bold" style:font-weight-asian="bold" style:font-weight-complex="bold" fo:font-size="16pt" style:font-size-asian="16pt" style:font-size-complex="12pt" style:language-asian="fr" style:country-asian="FR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4" style:parent-style-name="Normal" style:family="paragraph">
      <style:paragraph-properties fo:margin-top="0.0694in" fo:margin-bottom="0.0694in" fo:line-height="100%"/>
    </style:style>
    <style:style style:name="T5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6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7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8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9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10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1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1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1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15" style:parent-style-name="Normal" style:family="paragraph">
      <style:paragraph-properties fo:margin-top="0.0694in" fo:margin-bottom="0.0694in" fo:line-height="100%"/>
    </style:style>
    <style:style style:name="T16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17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8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19" style:parent-style-name="Normal" style:family="paragraph">
      <style:paragraph-properties fo:margin-top="0.0694in" fo:margin-bottom="0.0694in" fo:line-height="100%"/>
    </style:style>
    <style:style style:name="T20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21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2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3" style:parent-style-name="Normal" style:family="paragraph">
      <style:paragraph-properties fo:margin-top="0.0694in" fo:margin-bottom="0.0694in" fo:line-height="100%"/>
    </style:style>
    <style:style style:name="T24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25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6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27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8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9" style:parent-style-name="Normal" style:family="paragraph">
      <style:paragraph-properties fo:margin-top="0.0694in" fo:margin-bottom="0.0694in" fo:line-height="100%"/>
    </style:style>
    <style:style style:name="T30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31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2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33" style:parent-style-name="Normal" style:family="paragraph">
      <style:paragraph-properties fo:margin-top="0.0694in" fo:margin-bottom="0.0694in" fo:line-height="100%"/>
    </style:style>
    <style:style style:name="T34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35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6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3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3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39" style:parent-style-name="Normal" style:family="paragraph">
      <style:paragraph-properties fo:margin-top="0.0694in" fo:margin-bottom="0.0694in" fo:line-height="100%"/>
    </style:style>
    <style:style style:name="T40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41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42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43" style:parent-style-name="Normal" style:family="paragraph">
      <style:paragraph-properties fo:margin-top="0.0694in" fo:margin-bottom="0.0694in" fo:line-height="100%"/>
    </style:style>
    <style:style style:name="T44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45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46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47" style:parent-style-name="Normal" style:family="paragraph">
      <style:paragraph-properties fo:margin-top="0.0694in" fo:margin-bottom="0.0694in" fo:line-height="100%"/>
    </style:style>
    <style:style style:name="T48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49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50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1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52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53" style:parent-style-name="Normal" style:family="paragraph">
      <style:paragraph-properties fo:margin-top="0.0694in" fo:margin-bottom="0.0694in" fo:line-height="100%"/>
    </style:style>
    <style:style style:name="T54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5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56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7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58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59" style:parent-style-name="Normal" style:family="paragraph">
      <style:paragraph-properties fo:margin-top="0.0694in" fo:margin-bottom="0.0694in" fo:line-height="100%"/>
    </style:style>
    <style:style style:name="T60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1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62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63" style:parent-style-name="Normal" style:family="paragraph">
      <style:paragraph-properties fo:margin-top="0.0694in" fo:margin-bottom="0.0694in" fo:line-height="100%"/>
    </style:style>
    <style:style style:name="T64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5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66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67" style:parent-style-name="Paragraphedeliste" style:family="paragraph">
      <style:paragraph-properties style:vertical-align="auto" fo:margin-top="0.0694in" fo:margin-bottom="0.0694in" fo:line-height="100%"/>
      <style:text-properties fo:hyphenate="true"/>
    </style:style>
    <style:style style:name="T68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69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70" style:parent-style-name="Paragraphedeliste" style:family="paragraph">
      <style:paragraph-properties style:vertical-align="auto" fo:margin-top="0.0694in" fo:margin-bottom="0.0694in" fo:line-height="100%"/>
      <style:text-properties fo:hyphenate="true"/>
    </style:style>
    <style:style style:name="T71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72" style:parent-style-name="Paragraphedeliste" style:family="paragraph">
      <style:paragraph-properties style:vertical-align="auto" fo:margin-top="0.0694in" fo:margin-bottom="0.0694in" fo:line-height="100%"/>
      <style:text-properties fo:hyphenate="true"/>
    </style:style>
    <style:style style:name="T73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74" style:parent-style-name="Normal" style:family="paragraph">
      <style:paragraph-properties fo:margin-top="0.0694in" fo:margin-bottom="0.0694in" fo:line-height="100%"/>
    </style:style>
    <style:style style:name="T75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7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77" style:parent-style-name="Normal" style:family="paragraph">
      <style:paragraph-properties fo:margin-top="0.0694in" fo:margin-bottom="0.0694in" fo:line-height="100%"/>
    </style:style>
    <style:style style:name="P78" style:parent-style-name="Normal" style:family="paragraph">
      <style:paragraph-properties fo:margin-bottom="0in" fo:line-height="100%"/>
      <style:text-properties style:font-name="Times New Roman" style:font-name-asian="Times New Roman" fo:font-size="9pt" style:font-size-asian="9pt" style:font-size-complex="9pt" style:language-asian="fr" style:country-asian="FR"/>
    </style:style>
    <style:style style:name="P7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8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8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8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8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8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8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86" style:parent-style-name="Normal" style:family="paragraph">
      <style:text-properties fo:font-size="12pt" style:font-size-asian="12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Mise en place d’une solution de sécurité réseau pour une entreprise à base de produits open source</text:span></text:p>
      <text:p text:style-name="P3">Objectif général</text:p>
      <text:p text:style-name="P4"><text:span text:style-name="T5">Concevoir et déployer une solution de sécurité réseau complète, fiable et économique pour une entreprise, en utilisant exclusivement des outils open source. Cette solution visera à garantir la<text:s/></text:span><text:span text:style-name="T6">confidentialité</text:span><text:span text:style-name="T7">, l’</text:span><text:span text:style-name="T8">intégrité</text:span><text:span text:style-name="T9"><text:s/>et la<text:s/></text:span><text:span text:style-name="T10">disponibilité</text:span><text:span text:style-name="T11"><text:s/>du système d’information.</text:span></text:p>
      <text:p text:style-name="P12"/>
      <text:p text:style-name="P13"><text:s/>Objectifs spécifiques</text:p>
      <text:list text:style-name="LFO1" text:continue-numbering="true">
        <text:list-item>
          <text:p text:style-name="P14">Protéger le réseau contre les attaques internes et externes.</text:p>
        </text:list-item>
        <text:list-item>
          <text:p text:style-name="P15"><text:span text:style-name="T16">Mettre en place un tunnel<text:s/></text:span><text:span text:style-name="T17">IPSec site-à-site</text:span><text:span text:style-name="T18"><text:s/>entre plusieurs sites de l’entreprise.</text:span></text:p>
        </text:list-item>
        <text:list-item>
          <text:p text:style-name="P19"><text:span text:style-name="T20">Permettre un accès distant sécurisé via un<text:s/></text:span><text:span text:style-name="T21">VPN</text:span><text:span text:style-name="T22">.</text:span></text:p>
        </text:list-item>
        <text:list-item>
          <text:p text:style-name="P23"><text:span text:style-name="T24">Assurer une<text:s/></text:span><text:span text:style-name="T25">surveillance continue</text:span><text:span text:style-name="T26"><text:s/>du trafic grâce à un<text:s/></text:span><text:span text:style-name="T27">IDS/IPS</text:span><text:span text:style-name="T28">.</text:span></text:p>
        </text:list-item>
        <text:list-item>
          <text:p text:style-name="P29"><text:span text:style-name="T30">Réaliser une<text:s/></text:span><text:span text:style-name="T31">analyse approfondie du trafic réseau</text:span><text:span text:style-name="T32">.</text:span></text:p>
        </text:list-item>
        <text:list-item>
          <text:p text:style-name="P33"><text:span text:style-name="T34">Fournir une<text:s/></text:span><text:span text:style-name="T35">interface d’administration intuitive et sécurisée</text:span><text:span text:style-name="T36">.</text:span></text:p>
        </text:list-item>
      </text:list>
      <text:p text:style-name="P37"/>
      <text:p text:style-name="P38">🧱 Architecture proposée</text:p>
      <text:list text:style-name="LFO2" text:continue-numbering="true">
        <text:list-item>
          <text:p text:style-name="P39"><text:span text:style-name="T40">Pare-feu et segmentation du réseau</text:span><text:span text:style-name="T41"><text:s/>: avec<text:s/></text:span><text:span text:style-name="T42">pfSense</text:span></text:p>
        </text:list-item>
        <text:list-item>
          <text:p text:style-name="P43"><text:span text:style-name="T44">VPN site-à-site</text:span><text:span text:style-name="T45"><text:s/>: configuration d’un tunnel<text:s/></text:span><text:span text:style-name="T46">IPSec</text:span></text:p>
        </text:list-item>
        <text:list-item>
          <text:p text:style-name="P47"><text:span text:style-name="T48">Accès distant VPN</text:span><text:span text:style-name="T49"><text:s/>: avec<text:s/></text:span><text:span text:style-name="T50">WireGuard</text:span><text:span text:style-name="T51"><text:s/>ou<text:s/></text:span><text:span text:style-name="T52">OpenVPN</text:span></text:p>
        </text:list-item>
        <text:list-item>
          <text:p text:style-name="P53"><text:span text:style-name="T54">Détection/Prévention d’intrusions (IDS/IPS)</text:span><text:span text:style-name="T55"><text:s/>: avec<text:s/></text:span><text:span text:style-name="T56">Suricata</text:span><text:span text:style-name="T57"><text:s/>ou<text:s/></text:span><text:span text:style-name="T58">Snort</text:span></text:p>
        </text:list-item>
        <text:list-item>
          <text:p text:style-name="P59"><text:span text:style-name="T60">Analyse du trafic réseau</text:span><text:span text:style-name="T61"><text:s/>: avec<text:s/></text:span><text:span text:style-name="T62">ntopng</text:span></text:p>
        </text:list-item>
        <text:list-item>
          <text:p text:style-name="P63"><text:span text:style-name="T64">Tests de performance réseau</text:span><text:span text:style-name="T65"><text:s/>: avec<text:s/></text:span><text:span text:style-name="T66">iPerf3</text:span></text:p>
        </text:list-item>
        <text:list-item>
          <text:p text:style-name="P67"><text:span text:style-name="T68"><text:s/></text:span><text:span text:style-name="T69">PKI</text:span></text:p>
        </text:list-item>
        <text:list-item>
          <text:p text:style-name="P70"><text:span text:style-name="T71">Services (DHCP, NTP, DNS over TLS)</text:span></text:p>
        </text:list-item>
        <text:list-item>
          <text:p text:style-name="P72"><text:span text:style-name="T73">Traffic shaping</text:span></text:p>
        </text:list-item>
        <text:list-item>
          <text:p text:style-name="P74"><text:span text:style-name="T75">Etc<text:s/></text:span></text:p>
        </text:list-item>
      </text:list>
      <text:p text:style-name="P76"/>
      <text:soft-page-break/>
      <text:p text:style-name="P77"><draw:frame draw:style-name="a0" draw:name="Image 1" text:anchor-type="as-char" svg:x="0in" svg:y="0in" svg:width="6.3in" svg:height="4.04653in" style:rel-width="scale" style:rel-height="scale"><draw:image xlink:href="media/image1.png" xlink:type="simple" xlink:show="embed" xlink:actuate="onLoad"/><svg:title/><svg:desc>OpenVPN sous Pfsense - FingerInTheNet</svg:desc></draw:frame><text:s text:c="2"/></text:p>
      <text:p text:style-name="P78">URL : https://www.fingerinthenet.com/openvpn-sous-pfsense/</text:p>
      <text:p text:style-name="P79"/>
      <text:p text:style-name="P80"><text:s/>Livrables</text:p>
      <text:list text:style-name="LFO3" text:continue-numbering="true">
        <text:list-item>
          <text:p text:style-name="P81">Rapport complet du projet (conception, implémentation, tests)</text:p>
        </text:list-item>
        <text:list-item>
          <text:p text:style-name="P82">Documentation technique et d’administration</text:p>
        </text:list-item>
        <text:list-item>
          <text:p text:style-name="P83">Scripts ou fichiers de configuration</text:p>
        </text:list-item>
        <text:list-item>
          <text:p text:style-name="P84">Diagramme de l’architecture réseau sécurisée</text:p>
        </text:list-item>
        <text:list-item>
          <text:p text:style-name="P85">Présentation (PowerPoint ou PDF) pour la soutenance orale</text:p>
        </text:list-item>
      </text:list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10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kim</meta:initial-creator>
    <dc:creator>Chattaoui Abdelhakim</dc:creator>
    <meta:creation-date>2025-05-10T13:27:00Z</meta:creation-date>
    <dc:date>2025-05-10T13:27:00Z</dc:date>
    <meta:template xlink:href="Normal" xlink:type="simple"/>
    <meta:editing-cycles>2</meta:editing-cycles>
    <meta:editing-duration>PT540S</meta:editing-duration>
    <meta:document-statistic meta:page-count="2" meta:paragraph-count="2" meta:word-count="228" meta:character-count="1482" meta:row-count="10" meta:non-whitespace-character-count="1256"/>
  </office:meta>
</office:document-meta>
</file>